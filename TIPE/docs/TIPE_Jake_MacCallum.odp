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E0000014E6C9F5B42.png" manifest:media-type="image/png"/>
  <manifest:file-entry manifest:full-path="Pictures/100000000000034E000003169EB7C333.png" manifest:media-type="image/png"/>
  <manifest:file-entry manifest:full-path="Pictures/100000000000025600000102C19856D5.png" manifest:media-type="image/png"/>
  <manifest:file-entry manifest:full-path="Pictures/10000000000002EC000001628871C9B9.png" manifest:media-type="image/png"/>
  <manifest:file-entry manifest:full-path="Pictures/100000000000020C000000AAA1AFA871.png" manifest:media-type="image/png"/>
  <manifest:file-entry manifest:full-path="Pictures/10000000000002E60000038AC0CAA1C3.png" manifest:media-type="image/png"/>
  <manifest:file-entry manifest:full-path="Pictures/10000000000001380000041205D36474.png" manifest:media-type="image/png"/>
  <manifest:file-entry manifest:full-path="Pictures/1000164F0000060F0000015F7A7A3A99.svg" manifest:media-type="image/svg+xml"/>
  <manifest:file-entry manifest:full-path="Pictures/10000001000004000000040083FCA7FE.png" manifest:media-type="image/png"/>
  <manifest:file-entry manifest:full-path="Pictures/10006C7F00000DE70000051C82867832.svg" manifest:media-type="image/svg+xml"/>
  <manifest:file-entry manifest:full-path="Pictures/100000000000032A00000172DAC234E1.png" manifest:media-type="image/png"/>
  <manifest:file-entry manifest:full-path="Pictures/100013510000037E000001A77978E134.svg" manifest:media-type="image/svg+xml"/>
  <manifest:file-entry manifest:full-path="Pictures/1000431500000904000002F1FEDA289F.svg" manifest:media-type="image/svg+xml"/>
  <manifest:file-entry manifest:full-path="Pictures/1000000000000332000002CE2D489365.png" manifest:media-type="image/png"/>
  <manifest:file-entry manifest:full-path="Pictures/100000010000004A0000000EE5CBADF8.png" manifest:media-type="image/png"/>
  <manifest:file-entry manifest:full-path="Pictures/100000010000003B0000000D73466860.png" manifest:media-type="image/png"/>
  <manifest:file-entry manifest:full-path="Pictures/10000001000005B1000002B50C47496D.png" manifest:media-type="image/png"/>
  <manifest:file-entry manifest:full-path="Pictures/10002911000006C50000017AB23C2360.svg" manifest:media-type="image/svg+xml"/>
  <manifest:file-entry manifest:full-path="Pictures/100000000000033A00000194839788DF.png" manifest:media-type="image/png"/>
  <manifest:file-entry manifest:full-path="Pictures/1000000100000500000002DF4485AD72.png" manifest:media-type="image/png"/>
  <manifest:file-entry manifest:full-path="Pictures/1000000100000384000002D0672BBD24.png" manifest:media-type="image/png"/>
  <manifest:file-entry manifest:full-path="Pictures/100000000000028F000001958AE7166E.png" manifest:media-type="image/png"/>
  <manifest:file-entry manifest:full-path="Pictures/10000001000000570000001C114AC7A8.png" manifest:media-type="image/png"/>
  <manifest:file-entry manifest:full-path="Pictures/10000000000003400000018C7D55F77B.png" manifest:media-type="image/png"/>
  <manifest:file-entry manifest:full-path="Pictures/100000010000008700000031906FCAD6.png" manifest:media-type="image/png"/>
  <manifest:file-entry manifest:full-path="Pictures/100000000000055600000143C36206F5.png" manifest:media-type="image/png"/>
  <manifest:file-entry manifest:full-path="Pictures/100000000000033A000002A6F3AB43AC.png" manifest:media-type="image/png"/>
  <manifest:file-entry manifest:full-path="Pictures/TablePreview2.svm" manifest:media-type=""/>
  <manifest:file-entry manifest:full-path="Pictures/100000010000005C0000000E22ACF1AA.png" manifest:media-type="image/png"/>
  <manifest:file-entry manifest:full-path="Pictures/1000000100000258000001330C70F728.png" manifest:media-type="image/png"/>
  <manifest:file-entry manifest:full-path="Pictures/TablePreview1.svm" manifest:media-type=""/>
  <manifest:file-entry manifest:full-path="Pictures/10002DA7000009890000017A670DB345.svg" manifest:media-type="image/svg+xml"/>
  <manifest:file-entry manifest:full-path="Pictures/1000000000000342000003AA6B81DEFE.png" manifest:media-type="image/png"/>
  <manifest:file-entry manifest:full-path="Pictures/100000000000037C0000032AB8363344.png" manifest:media-type="image/png"/>
  <manifest:file-entry manifest:full-path="Pictures/100000010000002200000010F7350B81.png" manifest:media-type="image/png"/>
  <manifest:file-entry manifest:full-path="Pictures/1000000000000406000002A81B168D4F.png" manifest:media-type="image/png"/>
  <manifest:file-entry manifest:full-path="Pictures/10000001000000420000000E3C4E9947.png" manifest:media-type="image/png"/>
  <manifest:file-entry manifest:full-path="Pictures/100000000000033C00000240F0B0134D.png" manifest:media-type="image/png"/>
  <manifest:file-entry manifest:full-path="Pictures/100000000000039400000374586A17FA.png" manifest:media-type="image/png"/>
  <manifest:file-entry manifest:full-path="Pictures/100028A4000007A10000017A30BAE456.svg" manifest:media-type="image/svg+xml"/>
  <manifest:file-entry manifest:full-path="Pictures/100000000000033A00000324963B96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 style:font-pitch="variable"/>
    <style:font-face style:name="TexMaths Roman" svg:font-family="'TexMaths Roman'" style:font-pitch="variable"/>
    <style:font-face style:name="TexMaths Symbols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4.663cm" fo:min-width="27.5cm" loext:decorative="false"/>
    </style:style>
    <style:style style:name="gr3" style:family="graphic" style:parent-style-name="standard">
      <style:graphic-properties draw:fill-color="#244570" draw:opacity="100%" draw:textarea-horizontal-align="justify" draw:textarea-vertical-align="middle" draw:auto-grow-height="false" fo:min-height="1.25cm" fo:min-width="9.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0.413cm" fo:min-width="0.208cm" loext:decorative="false"/>
    </style:style>
    <style:style style:name="gr13" style:family="graphic" style:parent-style-name="standard">
      <style:graphic-properties draw:fill-color="#5983b0" draw:textarea-horizontal-align="justify" draw:textarea-vertical-align="middle" draw:auto-grow-height="false" fo:min-height="0.414cm" fo:min-width="0.208cm" loext:decorative="false"/>
    </style:style>
    <style:style style:name="gr14" style:family="graphic" style:parent-style-name="standard">
      <style:graphic-properties draw:fill-color="#5983b0" draw:textarea-horizontal-align="justify" draw:textarea-vertical-align="middle" draw:auto-grow-height="false" fo:min-height="0.458cm" fo:min-width="0.208cm" loext:decorative="false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812cm" fo:min-width="0.562cm" loext:decorative="false"/>
    </style:style>
    <style:style style:name="gr1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0" style:family="graphic" style:parent-style-name="standard">
      <style:graphic-properties draw:fill-color="#ff0000" draw:opacity="50%" draw:textarea-horizontal-align="justify" draw:textarea-vertical-align="middle" draw:auto-grow-height="false" fo:min-height="1.164cm" fo:min-width="0.914cm" loext:decorative="false"/>
    </style:style>
    <style:style style:name="gr21" style:family="graphic" style:parent-style-name="objectwithoutfill">
      <style:graphic-properties svg:stroke-width="0.035cm" svg:stroke-color="#ff0000" draw:marker-start-width="0.252cm" draw:marker-end="Arrowheads_20_6" draw:marker-end-width="0.352cm" svg:stroke-opacity="80%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opacity="0%" draw:textarea-horizontal-align="justify" draw:textarea-vertical-align="middle" draw:auto-grow-height="false" fo:min-height="3.77cm" fo:min-width="3.5cm" loext:decorative="false"/>
    </style:style>
    <style:style style:name="gr26" style:family="graphic" style:parent-style-name="standard">
      <style:graphic-properties draw:stroke="none" draw:fill="none" draw:fill-color="#ffffff" draw:auto-grow-width="true" fo:min-height="5.576cm" fo:min-width="11.536cm" loext:decorative="false"/>
      <style:paragraph-properties style:writing-mode="lr-tb"/>
    </style:style>
    <style:style style:name="gr27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28" style:family="graphic" style:parent-style-name="standard">
      <style:graphic-properties loext:decorative="fals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draw:stroke="none" draw:fill="none" draw:fill-color="#ffffff" draw:auto-grow-width="true" fo:min-height="0.937cm" fo:min-width="11.872cm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2c558a" draw:textarea-horizontal-align="justify" draw:textarea-vertical-align="middle" draw:auto-grow-height="false" fo:min-height="1.25cm" fo:min-width="15cm" style:writing-mode="lr-tb" loext:decorative="false"/>
      <style:paragraph-properties style:writing-mode="lr-tb"/>
    </style:style>
    <style:style style:name="pr1" style:family="presentation" style:parent-style-name="Default-outline1">
      <style:graphic-properties fo:min-height="11.929cm" loext:decorative="false"/>
      <style:paragraph-properties style:writing-mode="lr-tb"/>
    </style:style>
    <style:style style:name="pr2" style:family="presentation" style:parent-style-name="Default-title">
      <style:graphic-properties svg:stroke-color="#3465a4" draw:opacity="100%" draw:auto-grow-height="true" fo:min-height="3.50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5" style:family="presentation" style:parent-style-name="Default-outline1">
      <style:graphic-properties fo:min-height="1.275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5.087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3.375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2.544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3.81cm" loext:decorative="false"/>
      <style:paragraph-properties style:writing-mode="lr-tb"/>
    </style:style>
    <style:style style:name="co1" style:family="table-column">
      <style:table-column-properties style:column-width="6.747cm" style:use-optimal-column-width="false"/>
    </style:style>
    <style:style style:name="co2" style:family="table-column">
      <style:table-column-properties style:column-width="6.755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3.877cm" style:use-optimal-row-height="false"/>
    </style:style>
    <style:style style:name="ro3" style:family="table-row">
      <style:table-row-properties style:row-height="1.504cm" style:use-optimal-row-height="false"/>
    </style:style>
    <style:style style:name="ro4" style:family="table-row">
      <style:table-row-properties style:row-height="2.047cm" style:use-optimal-row-height="false"/>
    </style:style>
    <style:style style:name="ro5" style:family="table-row">
      <style:table-row-properties style:row-height="2.37cm" style:use-optimal-row-height="false"/>
    </style:style>
    <style:style style:name="ce1" style:family="table-cell">
      <style:paragraph-properties fo:text-align="center"/>
      <style:text-properties style:font-name="TexMaths Roman" fo:font-size="26pt" style:font-size-asian="26pt" style:font-size-complex="26pt"/>
    </style:style>
    <style:style style:name="ce2" style:family="table-cell">
      <style:paragraph-properties fo:margin-top="0cm" fo:margin-bottom="0cm" fo:text-align="center"/>
      <style:text-properties style:font-name="TexMaths Roman" fo:font-size="26pt" style:font-size-asian="26pt" style:font-size-complex="2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style:font-name="TexMaths Roman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opacity="100%"/>
      <style:text-properties fo:color="#ffffff" loext:opacity="100%" style:font-name="TexMaths Roman"/>
    </style:style>
    <style:style style:name="P6" style:family="paragraph">
      <style:paragraph-properties fo:text-align="center"/>
      <style:text-properties style:font-name="TexMaths Roman"/>
    </style:style>
    <style:style style:name="P7" style:family="paragraph">
      <loext:graphic-properties draw:fill-color="#244570" draw:opacity="100%"/>
      <style:paragraph-properties fo:text-align="center" style:writing-mode="lr-tb"/>
      <style:text-properties style:font-name="TexMaths Roman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TexMaths Roman" fo:font-weight="normal" style:font-weight-asian="normal" style:font-weight-complex="normal"/>
    </style:style>
    <style:style style:name="P9" style:family="paragraph">
      <loext:graphic-properties draw:fill-color="#2c558a"/>
      <style:paragraph-properties fo:margin-left="0cm" fo:margin-right="0cm" fo:margin-top="0cm" fo:margin-bottom="0cm" fo:line-height="100%" fo:text-align="center" fo:text-indent="0cm" style:writing-mode="lr-tb"/>
      <style:text-properties style:font-name="TexMaths Roman" fo:font-weight="normal" style:font-weight-asian="normal" style:font-weight-complex="normal"/>
    </style:style>
    <style:style style:name="P10" style:family="paragraph">
      <loext:graphic-properties draw:fill-color="#3465a4"/>
      <style:paragraph-properties fo:text-align="center" style:writing-mode="lr-tb"/>
      <style:text-properties style:font-name="TexMaths Roman"/>
    </style:style>
    <style:style style:name="P11" style:family="paragraph">
      <loext:graphic-properties draw:fill-color="#ffffff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666cm" fo:margin-bottom="0cm" fo:text-indent="0cm"/>
      <style:text-properties fo:hyphenate="false" loext:hyphenation-no-caps="false" loext:hyphenation-no-last-word="false"/>
    </style:style>
    <style:style style:name="P14" style:family="paragraph">
      <style:paragraph-properties fo:text-align="center"/>
      <style:text-properties style:font-name="TexMaths Roman" fo:hyphenate="false" loext:hyphenation-no-caps="false" loext:hyphenation-no-last-word="false"/>
    </style:style>
    <style:style style:name="P15" style:family="paragraph">
      <loext:graphic-properties draw:opacity="100%"/>
      <style:paragraph-properties fo:text-align="center"/>
      <style:text-properties fo:color="#ffffff" loext:opacity="100%" style:font-name="TexMaths BlackBoard"/>
    </style:style>
    <style:style style:name="P16" style:family="paragraph">
      <style:paragraph-properties fo:text-align="center"/>
      <style:text-properties style:font-name="TexMaths Roman" fo:font-size="18pt"/>
    </style:style>
    <style:style style:name="P17" style:family="paragraph">
      <loext:graphic-properties draw:fill-color="#244570" draw:opacity="100%"/>
      <style:paragraph-properties fo:text-align="center" style:writing-mode="lr-tb"/>
      <style:text-properties style:font-name="TexMaths Roman"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TexMaths Roman" fo:font-size="18pt" fo:font-weight="normal" style:font-weight-asian="normal" style:font-weight-complex="normal"/>
    </style:style>
    <style:style style:name="P19" style:family="paragraph">
      <loext:graphic-properties draw:fill-color="#2c558a"/>
      <style:paragraph-properties fo:margin-left="0cm" fo:margin-right="0cm" fo:margin-top="0cm" fo:margin-bottom="0cm" fo:line-height="100%" fo:text-align="center" fo:text-indent="0cm" style:writing-mode="lr-tb"/>
      <style:text-properties style:font-name="TexMaths Roman" fo:font-size="18pt" fo:font-weight="normal" style:font-weight-asian="normal" style:font-weight-complex="normal"/>
    </style:style>
    <style:style style:name="P20" style:family="paragraph">
      <loext:graphic-properties draw:fill-color="#3465a4"/>
      <style:paragraph-properties fo:text-align="center" style:writing-mode="lr-tb"/>
      <style:text-properties style:font-name="TexMaths Roman" fo:font-size="18pt"/>
    </style:style>
    <style:style style:name="P21" style:family="paragraph">
      <loext:graphic-properties draw:fill="none"/>
      <style:paragraph-properties fo:text-align="center"/>
      <style:text-properties fo:color="#c9211e" loext:opacity="100%"/>
    </style:style>
    <style:style style:name="P22" style:family="paragraph">
      <loext:graphic-properties draw:fill-color="#ffffff"/>
      <style:paragraph-properties fo:text-align="center"/>
      <style:text-properties style:font-name="TexMaths Roman" fo:font-size="42pt" style:font-size-asian="42pt" style:font-size-complex="4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-color="#5983b0"/>
      <style:paragraph-properties fo:text-align="center"/>
    </style:style>
    <style:style style:name="P25" style:family="paragraph">
      <loext:graphic-properties draw:fill-color="#729fcf"/>
      <style:paragraph-properties fo:text-align="center"/>
    </style:style>
    <style:style style:name="P26" style:family="paragraph">
      <loext:graphic-properties draw:fill-color="#ff0000" draw:opacity="50%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-color="#ffffff"/>
      <style:text-properties style:font-name="TexMaths Roman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fill="none" draw:fill-color="#ffffff"/>
      <style:text-properties style:font-name="TexMaths Roman"/>
    </style:style>
    <style:style style:name="P31" style:family="paragraph">
      <style:paragraph-properties fo:margin-top="0cm" fo:margin-bottom="0cm" fo:text-align="center"/>
      <style:text-properties style:font-name="TexMaths Roman" fo:font-size="26pt" style:font-size-asian="26pt" style:font-size-complex="26pt"/>
    </style:style>
    <style:style style:name="P32" style:family="paragraph">
      <style:paragraph-properties fo:text-align="center"/>
      <style:text-properties style:font-name="TexMaths Roman" fo:font-size="26pt" style:font-size-asian="26pt" style:font-size-complex="26pt"/>
    </style:style>
    <style:style style:name="P33" style:family="paragraph">
      <loext:graphic-properties draw:fill="none" draw:fill-color="#ffffff"/>
    </style:style>
    <style:style style:name="P34" style:family="paragraph">
      <style:paragraph-properties fo:margin-top="0.1cm" fo:margin-bottom="0.1cm" fo:text-align="center"/>
      <style:text-properties style:font-name="TexMaths Roman" fo:font-size="26pt" style:font-size-asian="26pt" style:font-size-complex="26pt"/>
    </style:style>
    <style:style style:name="P35" style:family="paragraph">
      <style:text-properties style:font-name="TexMaths Roman"/>
    </style:style>
    <style:style style:name="P36" style:family="paragraph">
      <style:text-properties style:font-name="TexMaths Roman" fo:font-size="32pt" style:font-size-asian="32pt" style:font-size-complex="32pt"/>
    </style:style>
    <style:style style:name="T1" style:family="text">
      <style:text-properties fo:color="#ffffff" loext:opacity="100%" style:font-name="TexMaths Roman" fo:font-size="28pt" style:font-size-asian="21pt" style:font-size-complex="21pt"/>
    </style:style>
    <style:style style:name="T2" style:family="text">
      <style:text-properties fo:color="#ffffff" loext:opacity="100%" style:font-name="TexMaths Roman" fo:font-size="42pt" style:font-size-asian="32pt" style:font-size-complex="32pt"/>
    </style:style>
    <style:style style:name="T3" style:family="text">
      <style:text-properties style:font-name="TexMaths Roman"/>
    </style:style>
    <style:style style:name="T4" style:family="text">
      <style:text-properties fo:color="#ffffff" loext:opacity="100%" style:font-name="TexMaths Roman" fo:font-size="18pt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6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style:font-name="TexMaths Roman"/>
    </style:style>
    <style:style style:name="T8" style:family="text">
      <style:text-properties style:font-name="TexMaths Roman" fo:font-size="18pt"/>
    </style:style>
    <style:style style:name="T9" style:family="text">
      <style:text-properties style:font-name="TexMaths Roman" fo:font-size="32pt" style:font-size-asian="22pt" style:font-size-complex="22pt"/>
    </style:style>
    <style:style style:name="T10" style:family="text">
      <style:text-properties style:font-name="TexMaths Symbols" fo:font-size="32pt" style:font-size-asian="22pt" style:font-size-complex="22pt"/>
    </style:style>
    <style:style style:name="T11" style:family="text">
      <style:text-properties style:font-name="TexMaths Roman" fo:font-size="42pt" style:font-size-asian="42pt" style:font-size-complex="42pt"/>
    </style:style>
    <style:style style:name="T12" style:family="text">
      <style:text-properties fo:color="#244570" loext:opacity="100%" style:font-name="TexMaths Roman" fo:font-size="42pt" style:font-size-asian="42pt" style:font-size-complex="42pt"/>
    </style:style>
    <style:style style:name="T13" style:family="text">
      <style:text-properties style:font-name="TexMaths Roman" fo:font-size="26pt" style:font-size-asian="26pt" style:font-size-complex="2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font-name="TexMaths Roman" fo:font-size="26pt" style:letter-kerning="true" style:font-name-asian="Noto Sans CJK SC" style:font-size-asian="26pt" style:font-name-complex="FreeSans" style:font-size-complex="26pt"/>
    </style:style>
    <style:style style:name="T16" style:family="text">
      <style:text-properties style:font-name="TexMaths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24457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28.6cm" svg:height="22.4cm" svg:x="-0.5cm" svg:y="0cm">
          <draw:image xlink:href="Pictures/1000000100000384000002D0672BBD24.png" xlink:type="simple" xlink:show="embed" xlink:actuate="onLoad" draw:mime-type="image/png">
            <text:p/>
          </draw:image>
        </draw:frame>
        <draw:frame presentation:style-name="pr1" draw:text-style-name="P3" draw:layer="layout" svg:width="22.1cm" svg:height="12.179cm" svg:x="2.4cm" svg:y="10.821cm" presentation:class="outline" presentation:user-transformed="true">
          <draw:text-box>
            <text:list text:style-name="L2">
              <text:list-header>
                <text:p text:style-name="P2"><text:span text:style-name="T1">15171 MACCALLUM </text:span><text:span text:style-name="T1">Jake </text:span></text:p>
                <text:p text:style-name="P2"><text:span text:style-name="T1">2026</text:span></text:p>
              </text:list-header>
            </text:list>
          </draw:text-box>
        </draw:frame>
        <draw:custom-shape draw:style-name="gr2" draw:text-style-name="P4" draw:layer="layout" svg:width="28cm" svg:height="4.913cm" svg:x="0cm" svg:y="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5cm" svg:x="1.423cm" svg:y="4.757cm" presentation:class="title" presentation:user-transformed="true">
          <draw:text-box>
            <text:p><text:span text:style-name="T2">Résolution du problème à N-corps</text:span></text:p>
          </draw:text-box>
        </draw:frame>
        <draw:custom-shape draw:style-name="gr3" draw:text-style-name="P7" draw:layer="layout" svg:width="10cm" svg:height="1.5cm" svg:x="0cm" svg:y="19.5cm">
          <text:p text:style-name="P6"><text:span text:style-name="T3">MacCallum Jake 15171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5.5cm" svg:height="1.5cm" svg:x="10cm" svg:y="19.5cm">
          <text:p text:style-name="P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5cm" svg:height="1.5cm" svg:x="25.5cm" svg:y="19.5cm">
          <text:p text:style-name="P6"><text:span text:style-name="T3">1/3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4" draw:text-style-name="P14" draw:layer="layout" svg:width="26cm" svg:height="12.179cm" svg:x="1.5cm" svg:y="6cm" presentation:class="outline" presentation:user-transformed="true">
          <draw:text-box>
            <text:list text:style-name="L3">
              <text:list-item>
                <text:p text:style-name="P12"><text:span text:style-name="T3"><text:s/></text:span><text:span text:style-name="T3">Introduction</text:span></text:p>
              </text:list-item>
              <text:list-item>
                <text:p text:style-name="P12"><text:span text:style-name="T3"><text:s/></text:span><text:span text:style-name="T3">Idée centrale</text:span></text:p>
              </text:list-item>
              <text:list-item>
                <text:p text:style-name="P13"><text:span text:style-name="T5"><text:s/></text:span><text:span text:style-name="T5">Barnes-Hut</text:span></text:p>
              </text:list-item>
              <text:list-item>
                <text:p text:style-name="P13"><text:span text:style-name="T5"><text:s/></text:span><text:span text:style-name="T5">FMM </text:span><text:span text:style-name="T6">(Fast Multipole </text:span><text:span text:style-name="T6">Method)</text:span></text:p>
              </text:list-item>
              <text:list-item>
                <text:p text:style-name="P12"><text:span text:style-name="T3"><text:s/></text:span><text:span text:style-name="T3">Résultats</text:span></text:p>
              </text:list-item>
              <text:list-item>
                <text:p text:style-name="P12"><text:span text:style-name="T3"><text:s/></text:span><text:span text:style-name="T3">Annexes</text:span></text:p>
              </text:list-item>
            </text:list>
          </draw:text-box>
        </draw:frame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5cm" svg:x="1.523cm" svg:y="0.757cm" presentation:class="title" presentation:user-transformed="true">
          <draw:text-box>
            <text:p><text:span text:style-name="T7">Sommaire</text:span></text:p>
          </draw:text-box>
        </draw:frame>
        <draw:custom-shape draw:style-name="gr3" draw:text-style-name="P7" draw:layer="layout" svg:width="10cm" svg:height="1.5cm" svg:x="0cm" svg:y="19.5cm">
          <text:p text:style-name="P6"><text:span text:style-name="T3">MacCa</text:span><text:span text:style-name="T3">llum </text:span><text:span text:style-name="T3">Jake </text:span><text:span text:style-name="T3">1517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5.5cm" svg:height="1.5cm" svg:x="10cm" svg:y="19.5cm">
          <text:p text:style-name="P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5cm" svg:height="1.5cm" svg:x="25.5cm" svg:y="19.5cm">
          <text:p text:style-name="P6"><text:span text:style-name="T3">2/3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 presentation:user-transformed="true">
          <draw:text-box>
            <text:p text:style-name="P2"><text:span text:style-name="T7">Introduction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3/30</text:span></text:p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6.5cm" svg:height="2.025cm" svg:x="12.5cm" svg:y="15.5cm" presentation:class="outline" presentation:user-transformed="true">
          <draw:text-box>
            <text:list text:style-name="L2">
              <text:list-header>
                <text:p text:style-name="P2"><text:span text:style-name="T9">Compléxité naïve : </text:span><text:span text:style-name="T10">O(N²)</text:span></text:p>
              </text:list-header>
            </text:list>
          </draw:text-box>
        </draw:frame>
        <draw:frame draw:style-name="gr9" draw:text-style-name="P21" draw:layer="layout" svg:width="12.297cm" svg:height="4.518cm" svg:x="14.703cm" svg:y="10cm" presentation:class="graphic" presentation:user-transformed="true">
          <draw:image xlink:href="Pictures/10006C7F00000DE70000051C82867832.svg" xlink:type="simple" xlink:show="embed" xlink:actuate="onLoad" draw:mime-type="image/svg+xml">
            <text:p/>
          </draw:image>
          <draw:image xlink:href="Pictures/100000010000008700000031906FCAD6.png" xlink:type="simple" xlink:show="embed" xlink:actuate="onLoad" draw:mime-type="image/png"/>
          <svg:title>TexMaths</svg:title>
          <svg:desc>28§display§\Psi(X_j)=\sum_{\substack{i=1\\i \ne j}}^{N} \frac{q_i}_{\left\lvert{X_i - X_j} \right\rvert}
§svg§600§TRUE§</svg:desc>
        </draw:frame>
        <draw:frame presentation:style-name="pr6" draw:text-style-name="P22" draw:layer="layout" svg:width="13.6cm" svg:height="5.087cm" svg:x="14.4cm" svg:y="5.5cm" presentation:class="subtitle" presentation:user-transformed="true">
          <draw:text-box>
            <text:p text:style-name="P2"><text:span text:style-name="T11">N-Body Problem</text:span></text:p>
          </draw:text-box>
        </draw:frame>
        <draw:frame draw:style-name="gr1" draw:text-style-name="P1" draw:layer="layout" svg:width="13.5cm" svg:height="13.5cm" svg:x="0.5cm" svg:y="5.501cm">
          <draw:image xlink:href="Pictures/10000001000004000000040083FCA7F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 presentation:user-transformed="true">
          <draw:text-box>
            <text:p text:style-name="P2"><text:span text:style-name="T7">Idée Centrale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4/30</text:span></text:p>
          <draw:enhanced-geometry svg:viewBox="0 0 21600 21600" draw:type="rectangle" draw:enhanced-path="M 0 0 L 21600 0 21600 21600 0 21600 0 0 Z N"/>
        </draw:custom-shape>
        <draw:frame presentation:style-name="pr6" draw:text-style-name="P22" draw:layer="layout" svg:width="20.1cm" svg:height="5.087cm" svg:x="10.4cm" svg:y="4.5cm" presentation:class="subtitle" presentation:user-transformed="true">
          <draw:text-box>
            <text:p text:style-name="P2"><text:span text:style-name="T11"><text:s/></text:span><text:span text:style-name="T12">1.</text:span><text:span text:style-name="T11"> Octree/Quadtree</text:span></text:p>
          </draw:text-box>
        </draw:frame>
        <draw:frame draw:style-name="gr1" draw:text-style-name="P1" draw:layer="layout" svg:width="23cm" svg:height="13.207cm" svg:x="3cm" svg:y="5.793cm">
          <draw:image xlink:href="Pictures/1000000100000500000002DF4485AD7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 presentation:user-transformed="true">
          <draw:text-box>
            <text:p text:style-name="P2"><text:span text:style-name="T7">Idée Centrale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5/30</text:span></text:p>
          <draw:enhanced-geometry svg:viewBox="0 0 21600 21600" draw:type="rectangle" draw:enhanced-path="M 0 0 L 21600 0 21600 21600 0 21600 0 0 Z N"/>
        </draw:custom-shape>
        <draw:frame presentation:style-name="pr7" draw:text-style-name="P22" draw:layer="layout" svg:width="28.5cm" svg:height="13.375cm" svg:x="3cm" svg:y="6.19cm" presentation:class="subtitle" presentation:user-transformed="true">
          <draw:text-box>
            <text:p text:style-name="P2"><text:span text:style-name="T11"><text:s text:c="9"/></text:span><text:span text:style-name="T12">2.</text:span><text:span text:style-name="T11"> Approximation</text:span></text:p>
            <text:list text:style-name="L4">
              <text:list-header>
                <text:p text:style-name="P2"><text:span text:style-name="T11"/></text:p>
              </text:list-header>
              <text:list-item>
                <text:p text:style-name="P2"><text:span text:style-name="T11">Barycentre</text:span></text:p>
                <text:p text:style-name="P2"><text:span text:style-name="T11">(masse et position)</text:span></text:p>
                <text:p text:style-name="P2"><text:span text:style-name="T11"/></text:p>
              </text:list-item>
              <text:list-item>
                <text:p text:style-name="P2"><text:span text:style-name="T11">Développement multipolaire</text:span></text:p>
              </text:list-item>
            </text:list>
            <text:p text:style-name="P2"><text:span text:style-name="T11">(développement en série)</text:span></text:p>
            <text:p text:style-name="P2"><text:span text:style-name="T11"/></text:p>
            <text:p text:style-name="P2"><text:span text:style-name="T11"/></text:p>
          </draw:text-box>
        </draw:frame>
        <draw:custom-shape draw:style-name="gr12" draw:text-style-name="P24" draw:layer="layout" svg:width="1cm" svg:height="0.937cm" svg:x="8.5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4" draw:layer="layout" svg:width="1cm" svg:height="0.938cm" svg:x="6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4" draw:layer="layout" svg:width="1cm" svg:height="0.937cm" svg:x="7.5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1cm" svg:height="1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1.5cm" svg:height="1.5cm" svg:x="2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cm" svg:y1="9.5cm" svg:x2="3.5cm" svg:y2="15cm">
          <text:p/>
        </draw:line>
        <draw:line draw:style-name="gr17" draw:text-style-name="P1" draw:layer="layout" svg:x1="8cm" svg:y1="6.5cm" svg:x2="4cm" svg:y2="14.5cm">
          <text:p/>
        </draw:line>
        <draw:line draw:style-name="gr18" draw:text-style-name="P1" draw:layer="layout" svg:x1="7cm" svg:y1="8cm" svg:x2="3.5cm" svg:y2="14.5cm">
          <text:p/>
        </draw:line>
        <draw:line draw:style-name="gr19" draw:text-style-name="P1" draw:layer="layout" svg:x1="10.5cm" svg:y1="7.5cm" svg:x2="4cm" svg:y2="15cm">
          <text:p/>
        </draw:line>
        <draw:custom-shape draw:style-name="gr20" draw:text-style-name="P26" draw:layer="layout" svg:width="2cm" svg:height="2cm" svg:x="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cm" svg:y1="8cm" svg:x2="3.5cm" svg:y2="15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>
          <draw:text-box>
            <text:p text:style-name="P2"><text:span text:style-name="T7">Barnes-Hut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6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66cm" svg:height="1.056cm" svg:x="1cm" svg:y="12.444cm">
          <draw:image xlink:href="Pictures/100028A4000007A10000017A30BAE456.svg" xlink:type="simple" xlink:show="embed" xlink:actuate="onLoad" draw:mime-type="image/svg+xml">
            <text:p/>
          </draw:image>
          <draw:image xlink:href="Pictures/100000010000004A0000000EE5CBADF8.png" xlink:type="simple" xlink:show="embed" xlink:actuate="onLoad" draw:mime-type="image/png"/>
          <svg:title>TexMaths</svg:title>
          <svg:desc>28§display§O(N\log(N))§svg§600§TRUE§</svg:desc>
        </draw:frame>
        <draw:frame draw:style-name="gr1" draw:text-style-name="P1" draw:layer="layout" svg:width="20.64cm" svg:height="9.816cm" svg:x="7cm" svg:y="5.684cm">
          <draw:image xlink:href="Pictures/10000001000005B1000002B50C47496D.png" xlink:type="simple" xlink:show="embed" xlink:actuate="onLoad" draw:mime-type="image/png">
            <text:p/>
          </draw:image>
        </draw:frame>
        <draw:frame presentation:style-name="pr8" draw:text-style-name="P28" draw:layer="layout" svg:width="16.699cm" svg:height="2.544cm" svg:x="2cm" svg:y="16cm" presentation:class="subtitle" presentation:user-transformed="true">
          <draw:text-box draw:corner-radius="3.199cm">
            <text:p><text:span text:style-name="T13">Erreur de la Terre après 1 jour :</text:span></text:p>
            <text:p text:style-name="P27"><text:span text:style-name="T14">(Par rapport à Horizons)</text:span></text:p>
          </draw:text-box>
        </draw:frame>
        <draw:frame presentation:style-name="pr9" draw:text-style-name="P11" draw:layer="layout" svg:width="6.699cm" svg:height="3.81cm" svg:x="16cm" svg:y="15cm">
          <draw:text-box>
            <text:p><text:span text:style-name="T13">219.559km</text:span></text:p>
          </draw:text-box>
        </draw:frame>
        <draw:frame draw:style-name="gr1" draw:text-style-name="P1" draw:layer="layout" svg:width="6cm" svg:height="1.956cm" svg:x="1cm" svg:y="7.544cm">
          <draw:image xlink:href="Pictures/1000431500000904000002F1FEDA289F.svg" xlink:type="simple" xlink:show="embed" xlink:actuate="onLoad" draw:mime-type="image/svg+xml">
            <text:p/>
          </draw:image>
          <draw:image xlink:href="Pictures/10000001000000570000001C114AC7A8.png" xlink:type="simple" xlink:show="embed" xlink:actuate="onLoad" draw:mime-type="image/png"/>
          <svg:title>TexMaths</svg:title>
          <svg:desc>28§display§\theta = \frac{\text{taille node}}{\text{distance}}§svg§600§TRUE§</svg:desc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>
          <draw:text-box>
            <text:p text:style-name="P2"><text:span text:style-name="T7">Leapfrog integration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7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544cm" svg:height="10cm" svg:x="4.5cm" svg:y="6.5cm">
          <draw:image xlink:href="Pictures/1000000100000258000001330C70F72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>
          <draw:text-box>
            <text:p text:style-name="P2"><text:span text:style-name="T7">FMM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8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1.956cm" svg:x="10.752cm" svg:y="10.774cm">
          <draw:image xlink:href="Pictures/1000431500000904000002F1FEDA289F.svg" xlink:type="simple" xlink:show="embed" xlink:actuate="onLoad" draw:mime-type="image/svg+xml">
            <text:p/>
          </draw:image>
          <draw:image xlink:href="Pictures/10000001000000570000001C114AC7A8.png" xlink:type="simple" xlink:show="embed" xlink:actuate="onLoad" draw:mime-type="image/png"/>
          <svg:title>TexMaths</svg:title>
          <svg:desc>28§display§\theta = \frac{\text{taille node}}{\text{distance}}§svg§600§TRUE§</svg:desc>
        </draw:frame>
        <draw:frame draw:style-name="gr1" draw:text-style-name="P1" draw:layer="layout" svg:width="4.34cm" svg:height="0.98cm" svg:x="0.892cm" svg:y="12.5cm">
          <draw:image xlink:href="Pictures/1000164F0000060F0000015F7A7A3A99.svg" xlink:type="simple" xlink:show="embed" xlink:actuate="onLoad" draw:mime-type="image/svg+xml">
            <text:p/>
          </draw:image>
          <draw:image xlink:href="Pictures/100000010000003B0000000D73466860.png" xlink:type="simple" xlink:show="embed" xlink:actuate="onLoad" draw:mime-type="image/png"/>
          <svg:title>TexMaths</svg:title>
          <svg:desc>28§display§O(N) + C§svg§600§TRUE§</svg:desc>
        </draw:frame>
        <draw:frame draw:style-name="gr1" draw:text-style-name="P1" draw:layer="layout" svg:width="17.329cm" svg:height="10.715cm" svg:x="10.5cm" svg:y="5.285cm">
          <draw:image xlink:href="Pictures/100000000000028F000001958AE7166E.png" xlink:type="simple" xlink:show="embed" xlink:actuate="onLoad" draw:mime-type="image/png">
            <text:p/>
          </draw:image>
        </draw:frame>
        <draw:frame draw:style-name="gr1" draw:text-style-name="P1" draw:layer="layout" svg:width="12.625cm" svg:height="2.985cm" svg:x="0.698cm" svg:y="7.5cm">
          <draw:image xlink:href="Pictures/100000000000055600000143C36206F5.png" xlink:type="simple" xlink:show="embed" xlink:actuate="onLoad" draw:mime-type="image/png">
            <text:p/>
          </draw:image>
        </draw:frame>
        <draw:custom-shape draw:style-name="gr25" draw:text-style-name="P29" draw:layer="layout" svg:width="4cm" svg:height="4.02cm" svg:x="2cm" svg:y="13.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32cm" svg:height="1.056cm" svg:x="2cm" svg:y="16.944cm">
          <draw:image xlink:href="Pictures/10002DA7000009890000017A670DB345.svg" xlink:type="simple" xlink:show="embed" xlink:actuate="onLoad" draw:mime-type="image/svg+xml">
            <text:p/>
          </draw:image>
          <draw:image xlink:href="Pictures/100000010000005C0000000E22ACF1AA.png" xlink:type="simple" xlink:show="embed" xlink:actuate="onLoad" draw:mime-type="image/png"/>
          <svg:title>TexMaths</svg:title>
          <svg:desc>28§display§\text{Ordre } p \Rightarrow (4p)!§svg§600§TRUE§</svg:desc>
        </draw:frame>
        <draw:frame draw:style-name="gr26" draw:text-style-name="P30" draw:layer="layout" svg:width="12.036cm" svg:height="5.826cm" svg:x="11.964cm" svg:y="16.674cm">
          <draw:text-box>
            <text:p><text:span text:style-name="T3">20! = 2.10¹⁸</text:span></text:p>
            <text:p><text:span text:style-name="T3"/></text:p>
            <text:p><text:span text:style-name="T3">Max_Int_64 = 9.10¹⁸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>
          <draw:text-box>
            <text:p text:style-name="P2"><text:span text:style-name="T7">Résultats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0/30</text:span></text:p>
          <draw:enhanced-geometry svg:viewBox="0 0 21600 21600" draw:type="rectangle" draw:enhanced-path="M 0 0 L 21600 0 21600 21600 0 21600 0 0 Z N"/>
        </draw:custom-shape>
        <draw:frame draw:style-name="gr28" draw:layer="layout" svg:width="20.248cm" svg:height="6.116cm" svg:x="3.752cm" svg:y="7.1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31"><text:span text:style-name="T13">Barnes-Hut</text:span></text:p>
              </table:table-cell>
              <table:table-cell>
                <text:p text:style-name="P32"><text:span text:style-name="T13">FMM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13">Complexité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32"><text:span text:style-name="T13">Erreur sur Terre (1 jour)</text:span></text:p>
                <text:p text:style-name="P32"><text:span text:style-name="T13">Par rapport à Horizons</text:span></text:p>
              </table:table-cell>
              <table:table-cell>
                <text:p text:style-name="P32"><text:span text:style-name="T13"/></text:p>
                <text:p text:style-name="P32"><text:span text:style-name="T13">219.559km</text:span></text:p>
              </table:table-cell>
              <table:table-cell>
                <text:p text:style-name="P32"><text:span text:style-name="T13"/></text:p>
                <text:p text:style-name="P32"><text:span text:style-name="T13">112.49k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5cm" svg:height="1.182cm" svg:x="19.2cm" svg:y="8.236cm">
          <draw:image xlink:href="Pictures/100013510000037E000001A77978E134.svg" xlink:type="simple" xlink:show="embed" xlink:actuate="onLoad" draw:mime-type="image/svg+xml">
            <text:p/>
          </draw:image>
          <draw:image xlink:href="Pictures/100000010000002200000010F7350B81.png" xlink:type="simple" xlink:show="embed" xlink:actuate="onLoad" draw:mime-type="image/png"/>
          <svg:title>TexMaths</svg:title>
          <svg:desc>28§display§O(n^2)
§svg§600§TRUE§</svg:desc>
        </draw:frame>
        <draw:frame draw:style-name="gr29" draw:text-style-name="P2" draw:layer="layout" svg:width="4.85cm" svg:height="1.056cm" svg:x="11.607cm" svg:y="8.318cm">
          <draw:image xlink:href="Pictures/10002911000006C50000017AB23C2360.svg" xlink:type="simple" xlink:show="embed" xlink:actuate="onLoad" draw:mime-type="image/svg+xml">
            <text:p/>
          </draw:image>
          <draw:image xlink:href="Pictures/10000001000000420000000E3C4E9947.png" xlink:type="simple" xlink:show="embed" xlink:actuate="onLoad" draw:mime-type="image/png"/>
          <svg:title>TexMaths</svg:title>
          <svg:desc>28§display§O(n\log(n))§svg§600§TRUE§</svg:desc>
        </draw:frame>
        <draw:frame draw:style-name="gr30" draw:text-style-name="P33" draw:layer="layout" svg:width="12.372cm" svg:height="1.187cm" svg:x="7.125cm" svg:y="15.5cm">
          <draw:text-box>
            <text:p>Hozizons : asteroïdes, relativité etc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>
          <draw:text-box>
            <text:p text:style-name="P2"><text:span text:style-name="T7">Résultats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1/30</text:span></text:p>
          <draw:enhanced-geometry svg:viewBox="0 0 21600 21600" draw:type="rectangle" draw:enhanced-path="M 0 0 L 21600 0 21600 21600 0 21600 0 0 Z N"/>
        </draw:custom-shape>
        <draw:frame draw:style-name="gr28" draw:layer="layout" svg:width="13.493cm" svg:height="9.257cm" svg:x="7.099cm" svg:y="6.77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1"/>
              <table:table-cell table:style-name="ce2">
                <text:p text:style-name="P31"><text:span text:style-name="T13">FMM</text:span></text:p>
              </table:table-cell>
            </table:table-row>
            <table:table-row table:style-name="ro4" table:default-cell-style-name="ce1">
              <table:table-cell>
                <text:p text:style-name="P32"><text:span text:style-name="T13">Erreur sur Terre (1 jour)</text:span></text:p>
                <text:p text:style-name="P32"><text:span text:style-name="T13">Par rapport au calcul naïf</text:span></text:p>
              </table:table-cell>
              <table:table-cell>
                <text:p text:style-name="P34"><text:span text:style-name="T15"/></text:p>
                <text:p text:style-name="P34"><text:span text:style-name="T15">500m</text:span></text:p>
              </table:table-cell>
            </table:table-row>
            <table:table-row table:style-name="ro5" table:default-cell-style-name="ce1">
              <table:table-cell>
                <text:p text:style-name="P32"><text:span text:style-name="T13">Erreur sur Terre (10 jour)</text:span></text:p>
                <text:p text:style-name="P32"><text:span text:style-name="T13">Par rapport au calcul naïf</text:span></text:p>
              </table:table-cell>
              <table:table-cell>
                <text:p text:style-name="P32"><text:span text:style-name="T13"/></text:p>
                <text:p text:style-name="P32"><text:span text:style-name="T13">7500k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office:forms form:automatic-focus="false" form:apply-design-mode="false"/>
        <draw:custom-shape draw:style-name="gr2" draw:text-style-name="P4" draw:layer="layout" svg:width="28cm" svg:height="4.913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25.199cm" svg:height="3.505cm" svg:x="1.4cm" svg:y="0.837cm" presentation:class="title">
          <draw:text-box>
            <text:p text:style-name="P2"><text:span text:style-name="T7">Conclusion</text:span></text:p>
          </draw:text-box>
        </draw:frame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2/30</text:span></text:p>
          <draw:enhanced-geometry svg:viewBox="0 0 21600 21600" draw:type="rectangle" draw:enhanced-path="M 0 0 L 21600 0 21600 21600 0 21600 0 0 Z N"/>
        </draw:custom-shape>
        <draw:frame presentation:style-name="pr1" draw:text-style-name="P35" draw:layer="layout" svg:width="12.297cm" svg:height="12.179cm" svg:x="1.4cm" svg:y="6.821cm" presentation:class="outline" presentation:user-transformed="true">
          <draw:text-box>
            <text:list text:style-name="L2">
              <text:list-header>
                <text:p text:style-name="P35"><text:span text:style-name="T9">Barnes-Hut fonctionne dans les limites de sa capacité</text:span></text:p>
                <text:p text:style-name="P35"><text:span text:style-name="T9">200km en 1 jour <text:s text:c="5"/>= 0.008 % de la distance parcourue par la Terre en 1 jour</text:span></text:p>
              </text:list-header>
            </text:list>
          </draw:text-box>
        </draw:frame>
        <draw:frame presentation:style-name="pr1" draw:text-style-name="P36" draw:layer="layout" svg:width="12.297cm" svg:height="12.179cm" svg:x="14.313cm" svg:y="7cm" presentation:class="outline" presentation:user-transformed="true">
          <draw:text-box>
            <text:list text:style-name="L2">
              <text:list-header>
                <text:p text:style-name="P36"><text:span text:style-name="T16">FMM est beaucoup </text:span><text:span text:style-name="T16">plus précis : 2.10⁻⁵ %</text:span></text:p>
                <text:p text:style-name="P36"><text:span text:style-name="T16">Mais n’a pas la bonne </text:span><text:span text:style-name="T16">complexité...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3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012cm" svg:height="10.477cm" svg:x="3.988cm" svg:y="5.023cm">
          <draw:image xlink:href="Pictures/10000000000003400000018C7D55F77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4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854cm" svg:height="17.938cm" svg:x="3.5cm" svg:y="1cm">
          <draw:image xlink:href="Pictures/100000000000033A000002A6F3AB43A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5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907cm" svg:height="15.239cm" svg:x="3.5cm" svg:y="1.761cm">
          <draw:image xlink:href="Pictures/100000000000033C00000240F0B0134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6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5cm" svg:height="19.499cm" svg:x="6cm" svg:y="0.001cm">
          <draw:image xlink:href="Pictures/1000000000000342000003AA6B81DEF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7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518cm" svg:height="18.025cm" svg:x="5.605cm" svg:y="0.5cm">
          <draw:image xlink:href="Pictures/100000000000033A00000324963B96A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8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642cm" svg:height="18.996cm" svg:x="3.358cm" svg:y="0.404cm">
          <draw:image xlink:href="Pictures/1000000000000332000002CE2D48936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19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854cm" svg:height="10.688cm" svg:x="4cm" svg:y="3.312cm">
          <draw:image xlink:href="Pictures/100000000000033A00000194839788D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0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786cm" svg:height="19.329cm" svg:x="1cm" svg:y="0.101cm">
          <draw:image xlink:href="Pictures/10000000000001380000041205D36474.png" xlink:type="simple" xlink:show="embed" xlink:actuate="onLoad" draw:mime-type="image/png">
            <text:p/>
          </draw:image>
        </draw:frame>
        <draw:frame draw:style-name="gr1" draw:text-style-name="P1" draw:layer="layout" svg:width="15.887cm" svg:height="19.399cm" svg:x="8.803cm" svg:y="0.101cm">
          <draw:image xlink:href="Pictures/10000000000002E60000038AC0CAA1C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1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01cm" svg:height="19.399cm" svg:x="0.1cm" svg:y="0.101cm">
          <draw:image xlink:href="Pictures/100000000000039400000374586A17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2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322cm" svg:height="3.997cm" svg:x="0.137cm" svg:y="10.003cm">
          <draw:image xlink:href="Pictures/100000000000020C000000AAA1AFA871.png" xlink:type="simple" xlink:show="embed" xlink:actuate="onLoad" draw:mime-type="image/png">
            <text:p/>
          </draw:image>
        </draw:frame>
        <draw:frame draw:style-name="gr1" draw:text-style-name="P1" draw:layer="layout" svg:width="19.79cm" svg:height="9.365cm" svg:x="8.1cm" svg:y="0.2cm">
          <draw:image xlink:href="Pictures/10000000000002EC000001628871C9B9.png" xlink:type="simple" xlink:show="embed" xlink:actuate="onLoad" draw:mime-type="image/png">
            <text:p/>
          </draw:image>
        </draw:frame>
        <draw:frame draw:style-name="gr1" draw:text-style-name="P1" draw:layer="layout" svg:width="15.821cm" svg:height="6.825cm" svg:x="12cm" svg:y="11.975cm">
          <draw:image xlink:href="Pictures/100000000000025600000102C19856D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3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43cm" svg:height="9.789cm" svg:x="0.07cm" svg:y="0.111cm">
          <draw:image xlink:href="Pictures/100000000000032A00000172DAC234E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4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383cm" svg:height="19.033cm" svg:x="0.117cm" svg:y="0.099cm">
          <draw:image xlink:href="Pictures/100000000000034E000003169EB7C33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5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251cm" svg:height="17.991cm" svg:x="0.1cm" svg:y="0.109cm">
          <draw:image xlink:href="Pictures/1000000000000406000002A81B168D4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6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49cm" svg:height="8.836cm" svg:x="0.351cm" svg:y="0.664cm">
          <draw:image xlink:href="Pictures/10000000000002AE0000014E6C9F5B4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7/3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925cm" svg:height="19.002cm" svg:x="0.075cm" svg:y="0.101cm">
          <draw:image xlink:href="Pictures/100000000000037C0000032AB836334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8/3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29/3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3" draw:text-style-name="P17" draw:layer="layout" svg:width="10cm" svg:height="1.5cm" svg:x="0cm" svg:y="19.5cm">
          <text:p text:style-name="P16"><text:span text:style-name="T8">MacCallum Jake 15171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5.5cm" svg:height="1.5cm" svg:x="10cm" svg:y="19.5cm">
          <text:p text:style-name="P18"><text:span text:style-name="T4">Résolution du problème à N-corp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1.5cm" svg:x="25.5cm" svg:y="19.5cm">
          <text:p text:style-name="P16"><text:span text:style-name="T8">30/3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 style:font-pitch="variable"/>
    <style:font-face style:name="TexMaths Roman" svg:font-family="'TexMaths Roman'" style:font-pitch="variable"/>
    <style:font-face style:name="TexMaths Symbols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31T22:54:14.810080564</meta:creation-date>
    <dc:date>2026-06-05T13:08:56.583679927</dc:date>
    <meta:editing-duration>P1DT1H39M32S</meta:editing-duration>
    <meta:editing-cycles>19</meta:editing-cycles>
    <meta:generator>LibreOffice/24.2.6.2$Linux_X86_64 LibreOffice_project/420$Build-2</meta:generator>
    <meta:document-statistic meta:object-count="247"/>
  </office:meta>
</office:document-meta>
</file>