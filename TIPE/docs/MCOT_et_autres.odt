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officeooo:rsid="000afe04" officeooo:paragraph-rsid="000afe04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officeooo:rsid="000afe04" officeooo:paragraph-rsid="000afe04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officeooo:rsid="000afe04" officeooo:paragraph-rsid="000afe04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officeooo:rsid="000afe04" officeooo:paragraph-rsid="000d1bcc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officeooo:rsid="000d1bcc" officeooo:paragraph-rsid="000d1bcc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officeooo:rsid="000e1ff8" officeooo:paragraph-rsid="000e1ff8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officeooo:rsid="000c6b1d" officeooo:paragraph-rsid="000c6b1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officeooo:rsid="000afe04" officeooo:paragraph-rsid="000afe0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officeooo:rsid="000afe04" officeooo:paragraph-rsid="000d1bcc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officeooo:rsid="000e1ff8" officeooo:paragraph-rsid="000e1ff8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officeooo:rsid="000e1ff8" officeooo:paragraph-rsid="001434f4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officeooo:rsid="0015fd69" officeooo:paragraph-rsid="0015fd69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paragraph-rsid="0017dc6c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officeooo:rsid="00205aac" officeooo:paragraph-rsid="00205aac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officeooo:rsid="002ba0d5" officeooo:paragraph-rsid="002ba0d5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officeooo:rsid="000e1ff8" officeooo:paragraph-rsid="00142eae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officeooo:rsid="002e502c" officeooo:paragraph-rsid="002e502c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officeooo:rsid="00142eae" officeooo:paragraph-rsid="00142eae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officeooo:rsid="000c6b1d" officeooo:paragraph-rsid="000c6b1d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8pt" officeooo:rsid="002668d6" officeooo:paragraph-rsid="002668d6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8pt" officeooo:rsid="000afe04" officeooo:paragraph-rsid="000afe0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officeooo:paragraph-rsid="002668d6"/>
    </style:style>
    <style:style style:name="P23" style:family="paragraph" style:parent-style-name="Standard">
      <style:paragraph-properties fo:text-align="start" style:justify-single-word="false"/>
      <style:text-properties officeooo:paragraph-rsid="0028f552"/>
    </style:style>
    <style:style style:name="P24" style:family="paragraph" style:parent-style-name="Standard">
      <style:paragraph-properties fo:text-align="start" style:justify-single-word="false"/>
      <style:text-properties officeooo:paragraph-rsid="002fdf7e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style="normal" officeooo:rsid="0017dc6c" officeooo:paragraph-rsid="0017dc6c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officeooo:rsid="001d2226" officeooo:paragraph-rsid="002668d6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officeooo:paragraph-rsid="002668d6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officeooo:paragraph-rsid="00126679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4pt" officeooo:paragraph-rsid="002c6318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officeooo:rsid="000afe04" officeooo:paragraph-rsid="000d1bcc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officeooo:rsid="002ba0d5" officeooo:paragraph-rsid="002ba0d5"/>
    </style:style>
    <style:style style:name="T1" style:family="text">
      <style:text-properties officeooo:rsid="000c6b1d"/>
    </style:style>
    <style:style style:name="T2" style:family="text">
      <style:text-properties officeooo:rsid="000d1bcc"/>
    </style:style>
    <style:style style:name="T3" style:family="text">
      <style:text-properties officeooo:rsid="00126679"/>
    </style:style>
    <style:style style:name="T4" style:family="text">
      <style:text-properties officeooo:rsid="00142eae"/>
    </style:style>
    <style:style style:name="T5" style:family="text">
      <style:text-properties officeooo:rsid="001434f4"/>
    </style:style>
    <style:style style:name="T6" style:family="text">
      <style:text-properties style:font-name="Arial" fo:font-size="14pt" officeooo:rsid="000e1ff8" style:font-size-asian="14pt" style:font-size-complex="14pt"/>
    </style:style>
    <style:style style:name="T7" style:family="text">
      <style:text-properties style:font-name="Arial" fo:font-size="14pt" officeooo:rsid="001434f4" style:font-size-asian="14pt" style:font-size-complex="14pt"/>
    </style:style>
    <style:style style:name="T8" style:family="text">
      <style:text-properties style:font-name="Arial" fo:font-size="14pt" officeooo:rsid="0015fd69" style:font-size-asian="14pt" style:font-size-complex="14pt"/>
    </style:style>
    <style:style style:name="T9" style:family="text">
      <style:text-properties style:font-name="Arial" fo:font-size="14pt" officeooo:rsid="0017dc6c" style:font-size-asian="14pt" style:font-size-complex="14pt"/>
    </style:style>
    <style:style style:name="T10" style:family="text">
      <style:text-properties style:font-name="Arial" fo:font-size="14pt" officeooo:rsid="001d2226" style:font-size-asian="14pt" style:font-size-complex="14pt"/>
    </style:style>
    <style:style style:name="T11" style:family="text">
      <style:text-properties style:font-name="Arial" fo:font-size="14pt" officeooo:rsid="002df97e" style:font-size-asian="14pt" style:font-size-complex="14pt"/>
    </style:style>
    <style:style style:name="T12" style:family="text">
      <style:text-properties style:font-name="Arial" fo:font-size="14pt" officeooo:rsid="002fdf7e" style:font-size-asian="14pt" style:font-size-complex="14pt"/>
    </style:style>
    <style:style style:name="T13" style:family="text">
      <style:text-properties officeooo:rsid="0019d3a6"/>
    </style:style>
    <style:style style:name="T14" style:family="text">
      <style:text-properties officeooo:rsid="001b319e"/>
    </style:style>
    <style:style style:name="T15" style:family="text">
      <style:text-properties officeooo:rsid="001d2226"/>
    </style:style>
    <style:style style:name="T16" style:family="text">
      <style:text-properties officeooo:rsid="0020e236"/>
    </style:style>
    <style:style style:name="T17" style:family="text">
      <style:text-properties officeooo:rsid="0021f388"/>
    </style:style>
    <style:style style:name="T18" style:family="text">
      <style:text-properties officeooo:rsid="0023b13f"/>
    </style:style>
    <style:style style:name="T19" style:family="text">
      <style:text-properties officeooo:rsid="00249dc0"/>
    </style:style>
    <style:style style:name="T20" style:family="text">
      <style:text-properties officeooo:rsid="002668d6"/>
    </style:style>
    <style:style style:name="T21" style:family="text">
      <style:text-properties style:font-name="Arial" officeooo:rsid="0017dc6c"/>
    </style:style>
    <style:style style:name="T22" style:family="text">
      <style:text-properties style:font-name="Arial" officeooo:rsid="002668d6"/>
    </style:style>
    <style:style style:name="T23" style:family="text">
      <style:text-properties style:font-name="Arial" fo:font-style="normal" officeooo:rsid="0017dc6c" style:font-style-asian="normal" style:font-style-complex="normal"/>
    </style:style>
    <style:style style:name="T24" style:family="text">
      <style:text-properties style:font-name="Arial" fo:font-style="normal" fo:font-weight="bold" officeooo:rsid="0017dc6c" style:font-style-asian="normal" style:font-style-complex="normal"/>
    </style:style>
    <style:style style:name="T25" style:family="text">
      <style:text-properties style:font-name="Arial" fo:font-style="italic" officeooo:rsid="0017dc6c" style:font-style-asian="normal" style:font-style-complex="normal"/>
    </style:style>
    <style:style style:name="T26" style:family="text">
      <style:text-properties style:font-name="Arial" fo:font-style="italic" officeooo:rsid="0017dc6c" style:font-style-asian="italic" style:font-style-complex="italic"/>
    </style:style>
    <style:style style:name="T27" style:family="text">
      <style:text-properties style:font-name="Arial" fo:font-size="14pt" style:font-size-asian="14pt" style:font-size-complex="14pt"/>
    </style:style>
    <style:style style:name="T28" style:family="text">
      <style:text-properties style:font-name="Arial" fo:font-size="14pt" officeooo:rsid="002668d6" style:font-size-asian="14pt" style:font-size-complex="14pt"/>
    </style:style>
    <style:style style:name="T29" style:family="text">
      <style:text-properties style:font-name="Arial" fo:font-size="14pt" officeooo:rsid="0028f552" style:font-size-asian="14pt" style:font-size-complex="14pt"/>
    </style:style>
    <style:style style:name="T30" style:family="text">
      <style:text-properties style:font-name="Arial" fo:font-size="14pt" officeooo:rsid="002ba0d5" style:font-size-asian="14pt" style:font-size-complex="14pt"/>
    </style:style>
    <style:style style:name="T31" style:family="text">
      <style:text-properties officeooo:rsid="00285806"/>
    </style:style>
    <style:style style:name="T32" style:family="text">
      <style:text-properties officeooo:rsid="0028f552"/>
    </style:style>
    <style:style style:name="T33" style:family="text">
      <style:text-properties officeooo:rsid="0029b7ad"/>
    </style:style>
    <style:style style:name="T34" style:family="text">
      <style:text-properties officeooo:rsid="002af478"/>
    </style:style>
    <style:style style:name="T35" style:family="text">
      <style:text-properties officeooo:rsid="002ba0d5"/>
    </style:style>
    <style:style style:name="T36" style:family="text">
      <style:text-properties officeooo:rsid="002c6318"/>
    </style:style>
    <style:style style:name="T37" style:family="text">
      <style:text-properties officeooo:rsid="000afe04"/>
    </style:style>
    <style:style style:name="T38" style:family="text">
      <style:text-properties officeooo:rsid="002df97e"/>
    </style:style>
    <style:style style:name="T39" style:family="text">
      <style:text-properties officeooo:rsid="002e502c"/>
    </style:style>
    <style:style style:name="T40" style:family="text">
      <style:text-properties officeooo:rsid="002fdf7e"/>
    </style:style>
    <style:style style:name="T41" style:family="text">
      <style:text-properties officeooo:rsid="0031be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numérique du problème gravitationnel à N-corps : Barnes-Hut et FMM</text:p>
      <text:p text:style-name="P2"/>
      <text:p text:style-name="P3">Ancrage au thème de l’année :</text:p>
      <text:p text:style-name="P7">Le mouvement périodique des astres dans notre système solaire <text:span text:style-name="T32">illustre </text:span>de<text:span text:style-name="T32">s</text:span> boucle<text:span text:style-name="T32">s et cycles</text:span>. <text:span text:style-name="T32">Simuler ces systèmes gravitationnels </text:span><text:span text:style-name="T33">permet d’étudier leurs caractéristiques.</text:span></text:p>
      <text:p text:style-name="P8"/>
      <text:p text:style-name="P3"><text:span text:style-name="T1">M</text:span>otivation du choix de l’étude (au maximum 50 mots) :</text:p>
      <text:p text:style-name="P7">Comprendre<text:span text:style-name="T33"> </text:span>le monde qui nous <text:span text:style-name="T3">e</text:span>ntoure est <text:span text:style-name="T40">motivation personnelle forte</text:span><text:span text:style-name="T13">.</text:span> <text:span text:style-name="T40">Les systèmes gravitationnels n’éxistent pas à la même échelle temporelle donc les simulations numériques donnent une bonne platforme pour analyser leurs caractéristiques.</text:span></text:p>
      <text:p text:style-name="P3"/>
      <text:p text:style-name="P4"><text:span text:style-name="T2">1. </text:span>Positionnements thématiques :</text:p>
      <text:p text:style-name="P9">- <text:span text:style-name="T2">Informatique pratique</text:span></text:p>
      <text:p text:style-name="P9">- <text:span text:style-name="T2">Informatique théorique</text:span></text:p>
      <text:p text:style-name="P9">- <text:span text:style-name="T2">Mécanique</text:span></text:p>
      <text:p text:style-name="P4"><text:span text:style-name="T2">M</text:span>ots-clés : </text:p>
      <text:p text:style-name="P28"><text:span text:style-name="T37">- </text:span><text:span text:style-name="T33">Problème à N-corps / </text:span><text:span text:style-name="T2">N-body problem </text:span></text:p>
      <text:p text:style-name="P9">- <text:span text:style-name="T2">Algorithme de Barnes-Hut / </text:span><text:span text:style-name="T33">Barnes-Hut algorithm</text:span></text:p>
      <text:p text:style-name="P9">- <text:span text:style-name="T33">Méthode Multipolaire Rapide / Fast Multipole Method</text:span></text:p>
      <text:p text:style-name="P29">- Intégrateurs symplectiques / <text:span text:style-name="T36">S</text:span><text:span text:style-name="T40">y</text:span><text:span text:style-name="T36">mplectic integrators</text:span></text:p>
      <text:p text:style-name="P9">- <text:span text:style-name="T33">Analyse d’erreur / Error analysis</text:span></text:p>
      <text:p text:style-name="P5"/>
      <text:p text:style-name="P3">2. Bibliographie commentée</text:p>
      <text:p text:style-name="P10">Le problème gravitationnel à N-corps ne possède pas de solution analytique générale pour N&gt;2 et doit donc être traité numériquement. <text:span text:style-name="T14">E</text:span><text:span text:style-name="T5">n effet, avec N corps, la force d’attraction gravitationnelle donne un système </text:span><text:span text:style-name="T40">quadratique</text:span><text:span text:style-name="T5"> </text:span><text:span text:style-name="T40">d’</text:span><text:span text:style-name="T38">é</text:span><text:span text:style-name="T5">quations. C</text:span>’est pourquoi ce problème est plus assimilable à un problème d’algorithmique, le calcul naïf <text:span text:style-name="T34">qui suit les équations coûte</text:span> O(N²) <text:span text:style-name="T34">par pas de temps, </text:span><text:span text:style-name="T5">une compl</text:span><text:span text:style-name="T38">e</text:span><text:span text:style-name="T5">xité qui explosera pour un grand système ; </text:span><text:span text:style-name="T3">mais </text:span>différents algorithmes permettent de réduire cette complexité.</text:p>
      <text:p text:style-name="P24"><text:span text:style-name="T6">Le </text:span><text:span text:style-name="T7">premier</text:span><text:span text:style-name="T6"> est l’algorithme de Barnes-Hut</text:span><text:span text:style-name="T9"> </text:span><text:span text:style-name="T8">[</text:span><text:span text:style-name="T9">1</text:span><text:span text:style-name="T8">]. </text:span><text:span text:style-name="T9">I</text:span><text:span text:style-name="T6">l permet de se ramener à une complexité temporelle </text:span><text:span text:style-name="T10">en</text:span><text:span text:style-name="T6"> O(N log N) au prix de précision. </text:span><text:span text:style-name="T7">En effet, plutôt que </text:span><text:span text:style-name="T8">de </text:span><text:span text:style-name="T7">calculer la force d’int</text:span><text:span text:style-name="T11">e</text:span><text:span text:style-name="T7">raction entre chaque corps, on découpe l’espace en 8 </text:span><text:span text:style-name="T8">en 3D (4 en 2D) </text:span><text:span text:style-name="T7">et grâce à l’organisation des corps selon un octree </text:span><text:span text:style-name="T8">(resp. quadtree)</text:span><text:span text:style-name="T7">, </text:span><text:span text:style-name="T8">pour chaque corps, </text:span><text:span text:style-name="T12">lorsque le rapport taille/distance est d’un groupe est inférieur à un seuil</text:span><text:span text:style-name="T8">, </text:span><text:span text:style-name="T7">l’algorithme approxime chacuns de ces corps au barycentre du groupe </text:span><text:span text:style-name="T8">et calcule 1 seule int</text:span><text:span text:style-name="T11">e</text:span><text:span text:style-name="T8">raction. [</text:span><text:span text:style-name="T10">2</text:span><text:span text:style-name="T8">]</text:span></text:p>
      <text:p text:style-name="P11"><text:span text:style-name="T3">Cet algorithme</text:span><text:span text:style-name="T4"> est assez populaire dans le monde du problème à N-corps </text:span><text:span text:style-name="T15">[3]</text:span><text:span text:style-name="T4">.</text:span></text:p>
      <text:p text:style-name="P12"><text:soft-page-break/>L’algorithme de Barnes-Hut nécessite un intégrateur stable sur de longues simulations, u<text:span text:style-name="T34">n intégrateur simplectique </text:span><text:span text:style-name="T38">qui préserve l’énergie </text:span><text:span text:style-name="T34">comme Leapfrog est alors mieux adapté qu’un intégrateur précis comme </text:span>Runge-Kutta. <text:span text:style-name="T35">[4]</text:span></text:p>
      <text:p text:style-name="P14">Le deuxième algorithme est la <text:span text:style-name="T18">Métho</text:span><text:span text:style-name="T19">de Multipolaire Rapide</text:span> (FMM) [<text:span text:style-name="T35">5</text:span>] qui <text:span text:style-name="T17">dans le cas de la gravitation</text:span> <text:span text:style-name="T17">calcule le potentiel.</text:span> <text:span text:style-name="T20">C</text:span>ette méthode a<text:span text:style-name="T16"> </text:span>des applications dans <text:span text:style-name="T17">pleins</text:span> <text:span text:style-name="T18">de </text:span>domaines <text:span text:style-name="T16">notamment en électromagnétisme. </text:span><text:span text:style-name="T18">Le potentiel est calculé localement avec des développements en séries </text:span><text:span text:style-name="T20">qui diffèrent selon la dimension </text:span><text:span text:style-name="T31">[</text:span><text:span text:style-name="T35">6</text:span><text:span text:style-name="T31">].</text:span><text:span text:style-name="T18"> </text:span><text:span text:style-name="T31">S</text:span><text:span text:style-name="T18">imilairement à Barnes-Hut </text:span><text:span text:style-name="T19">on approxime les sources lointaines. </text:span></text:p>
      <text:p text:style-name="P17">Comparer ces deux algorithmes permet d’étudier les compromis entre complexité algorithmique, précision et coût selon le système étudié.</text:p>
      <text:p text:style-name="P10"/>
      <text:p text:style-name="P3">3. Problématique retenue</text:p>
      <text:p text:style-name="P15">Quelle précision peut-on obtenir pour Barnes-Hut et FMM sur des simulations de systèmes gravitationnels connus, tout en cherchant à minimiser le coût ?</text:p>
      <text:p text:style-name="P6"/>
      <text:p text:style-name="P3">4. Objectifs du TIPE </text:p>
      <text:p text:style-name="P18"><text:span text:style-name="T39">I</text:span>mplément<text:span text:style-name="T39">er</text:span> <text:span text:style-name="T39">l’</text:span>algorithme <text:span text:style-name="T39">de </text:span>Barnes-Hut <text:span text:style-name="T39">et le</text:span> <text:span text:style-name="T35">tester sur </text:span><text:span text:style-name="T39">des systèmes simples </text:span><text:span text:style-name="T41">ainsi</text:span><text:span text:style-name="T39"> </text:span><text:span text:style-name="T41">qu’</text:span>une simulation du système solaire. <text:span text:style-name="T39">É</text:span>tud<text:span text:style-name="T39">ier</text:span> <text:span text:style-name="T41">les</text:span> erreurs d’approximation dans celui-ci <text:span text:style-name="T39">en fonction des paramètres</text:span>. <text:span text:style-name="T41">Mettre en oeuvre</text:span><text:span text:style-name="T39"> </text:span>la F<text:span text:style-name="T35">M</text:span>M<text:span text:style-name="T39"> en 3 dimensions et </text:span><text:span text:style-name="T41">comparer sa précision et performance à </text:span><text:span text:style-name="T39">Barnes-Hut sur différentes simulations. Analyser les caractéristiques de différents intégrateurs temporels.</text:span></text:p>
      <text:p text:style-name="P16"/>
      <text:p text:style-name="P3">5. Liste de références bibliographiques </text:p>
      <text:p text:style-name="P13"><text:span text:style-name="T21">[1] </text:span><text:span text:style-name="T22">P. </text:span><text:span text:style-name="T23">Barnes, J. Hut, <text:s/>A hierarchical </text:span><text:span text:style-name="T25">O(N log N)</text:span><text:span text:style-name="T23"> force-calculation algorithm. </text:span><text:span text:style-name="T26">Nature</text:span><text:span text:style-name="T23"> </text:span><text:span text:style-name="T24">324</text:span><text:span text:style-name="T23">, 446–449 (1986). </text:span><text:a xlink:type="simple" xlink:href="https://doi.org/10.1038/324446a0" text:style-name="Internet_20_link" text:visited-style-name="Visited_20_Internet_20_Link"><text:span text:style-name="T23">https://doi.org/10.1038/324446a0</text:span></text:a></text:p>
      <text:p text:style-name="P25">[2] https://arborjs.org/docs/barnes-hut</text:p>
      <text:p text:style-name="P27"><text:span text:style-name="T15">[3] </text:span>How to make HUGE N-Body Simulations (N=1,000,000+), </text:p>
      <text:p text:style-name="P26"><text:a xlink:type="simple" xlink:href="https://youtu.be/nZHjD3cI-EU?si=NO86acuNhXHZa_5a" text:style-name="Internet_20_link" text:visited-style-name="Visited_20_Internet_20_Link">https://youtu.be/nZHjD3cI-EU?si=NO86acuNhXHZa_5a</text:a></text:p>
      <text:p text:style-name="P31"><text:span text:style-name="T29">[</text:span><text:span text:style-name="T27">4] E. Hairer, C. Lubich, G. Wanner, Geometric Numerical Integration : Structure-Preservng Algorithms for Ordinary Differential Equations, Springer Series in Computational Mathematics ; 31</text:span></text:p>
      <text:p text:style-name="P23"><text:span text:style-name="T29">[</text:span><text:span text:style-name="T30">5</text:span><text:span text:style-name="T29">] <text:s/></text:span><text:span text:style-name="T28">L. Greengard, V. Rokhlin, </text:span><text:span text:style-name="T29">A fast algorithm for particle simulations, <text:s/></text:span><text:span text:style-name="T28">Journal of Computational Physics, </text:span><text:span text:style-name="T29">7</text:span><text:span text:style-name="T27">3(2):325-348 </text:span><text:span text:style-name="T29">(1987), DOI:</text:span><text:a xlink:type="simple" xlink:href="https://doi.org/10.1016/0021-9991(87)90140-9" office:target-frame-name="_blank" xlink:show="new" text:style-name="Internet_20_link" text:visited-style-name="Visited_20_Internet_20_Link"><text:span text:style-name="T29">10.1016/0021-9991(87)90140-9</text:span></text:a></text:p>
      <text:p text:style-name="P22"><text:span text:style-name="T28">[</text:span><text:span text:style-name="T30">6</text:span><text:span text:style-name="T28">] H. Cheng, L. Greengard, V. Rokhlin, </text:span><text:span text:style-name="T27">A Fast Adaptive Multipole Algorithm in Three Dimension</text:span><text:span text:style-name="T28">s. Journal of Computational Physics, </text:span><text:span text:style-name="T27">155(2):468-498 </text:span><text:span text:style-name="T28">(1999), </text:span><text:span text:style-name="T27">DOI:</text:span><text:a xlink:type="simple" xlink:href="https://doi.org/10.1006/jcph.1999.6355" office:target-frame-name="_blank" xlink:show="new" text:style-name="Internet_20_link" text:visited-style-name="Visited_20_Internet_20_Link"><text:span text:style-name="T27">10.1006/jcph.1999.635</text:span></text:a><text:span text:style-name="T28">5</text:span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21:07:15.617602712</meta:creation-date>
    <dc:date>2026-02-02T08:06:04.596442872</dc:date>
    <meta:editing-duration>P2DT3H27M24S</meta:editing-duration>
    <meta:editing-cycles>18</meta:editing-cycles>
    <meta:generator>LibreOffice/24.2.6.2$Linux_X86_64 LibreOffice_project/420$Build-2</meta:generator>
    <meta:document-statistic meta:table-count="0" meta:image-count="0" meta:object-count="0" meta:page-count="2" meta:paragraph-count="34" meta:word-count="594" meta:character-count="4208" meta:non-whitespace-character-count="3642"/>
  </office:meta>
</office:document-meta>
</file>